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153a" officeooo:paragraph-rsid="0013153a"/>
    </style:style>
    <style:style style:name="P2" style:family="paragraph" style:parent-style-name="Standard">
      <style:paragraph-properties style:writing-mode="lr-tb" style:writing-mode-automatic="false"/>
      <style:text-properties officeooo:rsid="0013153a" officeooo:paragraph-rsid="00141295"/>
    </style:style>
    <style:style style:name="P3" style:family="paragraph" style:parent-style-name="Standard">
      <style:text-properties officeooo:paragraph-rsid="0013153a"/>
    </style:style>
    <style:style style:name="P4" style:family="paragraph" style:parent-style-name="Heading_20_2">
      <style:text-properties fo:font-size="12pt" officeooo:rsid="00141295" officeooo:paragraph-rsid="00141295" style:font-size-asian="12pt" style:font-size-complex="12pt"/>
    </style:style>
    <style:style style:name="P5" style:family="paragraph" style:parent-style-name="Text_20_body">
      <style:text-properties officeooo:rsid="0013153a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13153a"/>
    </style:style>
    <style:style style:name="P7" style:family="paragraph" style:parent-style-name="Text_20_body" style:list-style-name="L1">
      <style:text-properties officeooo:rsid="0013153a"/>
    </style:style>
    <style:style style:name="P8" style:family="paragraph" style:parent-style-name="Heading_20_2">
      <style:paragraph-properties fo:keep-with-next="always"/>
      <style:text-properties fo:font-size="12pt" officeooo:rsid="00141295" officeooo:paragraph-rsid="00141295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officeooo:rsid="0013153a"/>
    </style:style>
    <style:style style:name="P10" style:family="paragraph" style:parent-style-name="Text_20_body" style:list-style-name="L2">
      <style:text-properties officeooo:rsid="0013153a"/>
    </style:style>
    <style:style style:name="P11" style:family="paragraph" style:parent-style-name="Heading_20_2">
      <style:text-properties officeooo:rsid="0013153a" officeooo:paragraph-rsid="0013153a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13153a"/>
    </style:style>
    <style:style style:name="P13" style:family="paragraph" style:parent-style-name="Text_20_body" style:list-style-name="L3">
      <style:text-properties officeooo:rsid="0013153a"/>
    </style:style>
    <style:style style:name="P14" style:family="paragraph" style:parent-style-name="Heading_20_2">
      <style:text-properties fo:font-size="12pt" officeooo:rsid="0013153a" officeooo:paragraph-rsid="0013153a" style:font-size-asian="12pt" style:font-size-complex="12pt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officeooo:rsid="0013153a"/>
    </style:style>
    <style:style style:name="P16" style:family="paragraph" style:parent-style-name="Text_20_body" style:list-style-name="L4">
      <style:text-properties officeooo:rsid="0013153a"/>
    </style:style>
    <style:style style:name="P17" style:family="paragraph" style:parent-style-name="Heading_20_2">
      <style:paragraph-properties fo:break-before="page"/>
      <style:text-properties officeooo:rsid="0013153a" officeooo:paragraph-rsid="0013153a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officeooo:rsid="0013153a"/>
    </style:style>
    <style:style style:name="P19" style:family="paragraph" style:parent-style-name="Text_20_body" style:list-style-name="L5">
      <style:text-properties officeooo:rsid="0013153a"/>
    </style:style>
    <style:style style:name="P20" style:family="paragraph" style:parent-style-name="Heading_20_1">
      <style:text-properties officeooo:rsid="0013153a" officeooo:paragraph-rsid="0013153a"/>
    </style:style>
    <style:style style:name="P21" style:family="paragraph" style:parent-style-name="Heading_20_2">
      <style:text-properties officeooo:rsid="0013153a"/>
    </style:style>
    <style:style style:name="P22" style:family="paragraph" style:parent-style-name="Horizontal_20_Line">
      <style:text-properties officeooo:rsid="0013153a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officeooo:rsid="0013153a"/>
    </style:style>
    <style:style style:name="P24" style:family="paragraph" style:parent-style-name="Text_20_body" style:list-style-name="L6">
      <style:text-properties officeooo:rsid="0013153a"/>
    </style:style>
    <style:style style:name="P25" style:family="paragraph" style:parent-style-name="Heading_20_3">
      <style:text-properties officeooo:rsid="0013153a"/>
    </style:style>
    <style:style style:name="P26" style:family="paragraph" style:parent-style-name="Text_20_body" style:list-style-name="L7">
      <style:paragraph-properties fo:margin-top="0cm" fo:margin-bottom="0cm" style:contextual-spacing="false"/>
      <style:text-properties officeooo:rsid="0013153a"/>
    </style:style>
    <style:style style:name="P27" style:family="paragraph" style:parent-style-name="Text_20_body" style:list-style-name="L7">
      <style:text-properties officeooo:rsid="0013153a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officeooo:rsid="0013153a"/>
    </style:style>
    <style:style style:name="P29" style:family="paragraph" style:parent-style-name="Text_20_body" style:list-style-name="L8">
      <style:text-properties officeooo:rsid="0013153a"/>
    </style:style>
    <style:style style:name="P30" style:family="paragraph" style:parent-style-name="Text_20_body" style:list-style-name="L9">
      <style:paragraph-properties fo:margin-top="0cm" fo:margin-bottom="0cm" style:contextual-spacing="false"/>
      <style:text-properties officeooo:rsid="0013153a"/>
    </style:style>
    <style:style style:name="P31" style:family="paragraph" style:parent-style-name="Text_20_body" style:list-style-name="L9">
      <style:text-properties officeooo:rsid="0013153a"/>
    </style:style>
    <style:style style:name="P32" style:family="paragraph" style:parent-style-name="Text_20_body" style:list-style-name="L10">
      <style:paragraph-properties fo:margin-top="0cm" fo:margin-bottom="0cm" style:contextual-spacing="false"/>
      <style:text-properties officeooo:rsid="0013153a"/>
    </style:style>
    <style:style style:name="P33" style:family="paragraph" style:parent-style-name="Text_20_body" style:list-style-name="L10">
      <style:text-properties officeooo:rsid="0013153a"/>
    </style:style>
    <style:style style:name="P34" style:family="paragraph" style:parent-style-name="Text_20_body" style:list-style-name="L11">
      <style:paragraph-properties fo:margin-top="0cm" fo:margin-bottom="0cm" style:contextual-spacing="false"/>
      <style:text-properties officeooo:rsid="0013153a"/>
    </style:style>
    <style:style style:name="P35" style:family="paragraph" style:parent-style-name="Text_20_body" style:list-style-name="L11">
      <style:text-properties officeooo:rsid="0013153a"/>
    </style:style>
    <style:style style:name="P36" style:family="paragraph" style:parent-style-name="Text_20_body" style:list-style-name="L12">
      <style:paragraph-properties fo:margin-top="0cm" fo:margin-bottom="0cm" style:contextual-spacing="false"/>
      <style:text-properties officeooo:rsid="0013153a"/>
    </style:style>
    <style:style style:name="P37" style:family="paragraph" style:parent-style-name="Text_20_body" style:list-style-name="L12">
      <style:text-properties officeooo:rsid="0013153a"/>
    </style:style>
    <style:style style:name="P38" style:family="paragraph" style:parent-style-name="Text_20_body" style:list-style-name="L13">
      <style:paragraph-properties fo:margin-top="0cm" fo:margin-bottom="0cm" style:contextual-spacing="false"/>
      <style:text-properties officeooo:rsid="0013153a"/>
    </style:style>
    <style:style style:name="P39" style:family="paragraph" style:parent-style-name="Text_20_body" style:list-style-name="L13">
      <style:text-properties officeooo:rsid="0013153a"/>
    </style:style>
    <style:style style:name="P40" style:family="paragraph" style:parent-style-name="Text_20_body" style:list-style-name="L14">
      <style:paragraph-properties fo:margin-top="0cm" fo:margin-bottom="0cm" style:contextual-spacing="false"/>
      <style:text-properties officeooo:rsid="0013153a"/>
    </style:style>
    <style:style style:name="P41" style:family="paragraph" style:parent-style-name="Text_20_body" style:list-style-name="L14">
      <style:text-properties officeooo:rsid="0013153a"/>
    </style:style>
    <style:style style:name="P42" style:family="paragraph" style:parent-style-name="Text_20_body" style:list-style-name="L15">
      <style:paragraph-properties fo:margin-top="0cm" fo:margin-bottom="0cm" style:contextual-spacing="false"/>
      <style:text-properties officeooo:rsid="0013153a"/>
    </style:style>
    <style:style style:name="P43" style:family="paragraph" style:parent-style-name="Text_20_body" style:list-style-name="L15">
      <style:text-properties officeooo:rsid="0013153a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rsid="0013153a"/>
    </style:style>
    <style:style style:name="P45" style:family="paragraph" style:parent-style-name="Text_20_body" style:list-style-name="L16">
      <style:paragraph-properties fo:margin-top="0cm" fo:margin-bottom="0cm" style:contextual-spacing="false"/>
      <style:text-properties officeooo:rsid="0013153a"/>
    </style:style>
    <style:style style:name="P46" style:family="paragraph" style:parent-style-name="Text_20_body" style:list-style-name="L16">
      <style:text-properties officeooo:rsid="0013153a"/>
    </style:style>
    <style:style style:name="P47" style:family="paragraph" style:parent-style-name="Text_20_body" style:list-style-name="L17">
      <style:paragraph-properties fo:margin-top="0cm" fo:margin-bottom="0cm" style:contextual-spacing="false"/>
      <style:text-properties officeooo:rsid="0013153a"/>
    </style:style>
    <style:style style:name="P48" style:family="paragraph" style:parent-style-name="Text_20_body" style:list-style-name="L17">
      <style:text-properties officeooo:rsid="0013153a"/>
    </style:style>
    <style:style style:name="P49" style:family="paragraph" style:parent-style-name="Text_20_body" style:list-style-name="L18">
      <style:paragraph-properties fo:margin-top="0cm" fo:margin-bottom="0cm" style:contextual-spacing="false"/>
      <style:text-properties officeooo:rsid="0013153a"/>
    </style:style>
    <style:style style:name="P50" style:family="paragraph" style:parent-style-name="Text_20_body" style:list-style-name="L18">
      <style:text-properties officeooo:rsid="0013153a"/>
    </style:style>
    <style:style style:name="P51" style:family="paragraph" style:parent-style-name="Text_20_body" style:list-style-name="L19">
      <style:paragraph-properties fo:margin-top="0cm" fo:margin-bottom="0cm" style:contextual-spacing="false"/>
      <style:text-properties officeooo:rsid="0013153a"/>
    </style:style>
    <style:style style:name="P52" style:family="paragraph" style:parent-style-name="Text_20_body" style:list-style-name="L19">
      <style:text-properties officeooo:rsid="0013153a"/>
    </style:style>
    <style:style style:name="P53" style:family="paragraph" style:parent-style-name="Text_20_body" style:list-style-name="L20">
      <style:paragraph-properties fo:margin-top="0cm" fo:margin-bottom="0cm" style:contextual-spacing="false"/>
      <style:text-properties officeooo:rsid="0013153a"/>
    </style:style>
    <style:style style:name="P54" style:family="paragraph" style:parent-style-name="Text_20_body" style:list-style-name="L20">
      <style:text-properties officeooo:rsid="0013153a"/>
    </style:style>
    <style:style style:name="P55" style:family="paragraph" style:parent-style-name="Text_20_body" style:list-style-name="L21">
      <style:paragraph-properties fo:margin-top="0cm" fo:margin-bottom="0cm" style:contextual-spacing="false"/>
      <style:text-properties officeooo:rsid="0013153a"/>
    </style:style>
    <style:style style:name="P56" style:family="paragraph" style:parent-style-name="Text_20_body" style:list-style-name="L21">
      <style:text-properties officeooo:rsid="0013153a"/>
    </style:style>
    <style:style style:name="P57" style:family="paragraph" style:parent-style-name="Text_20_body" style:list-style-name="L22">
      <style:paragraph-properties fo:margin-top="0cm" fo:margin-bottom="0cm" style:contextual-spacing="false"/>
      <style:text-properties officeooo:rsid="0013153a"/>
    </style:style>
    <style:style style:name="P58" style:family="paragraph" style:parent-style-name="Text_20_body" style:list-style-name="L22">
      <style:text-properties officeooo:rsid="0013153a"/>
    </style:style>
    <style:style style:name="P59" style:family="paragraph" style:parent-style-name="Quotations">
      <style:text-properties officeooo:rsid="0013153a"/>
    </style:style>
    <style:style style:name="P60" style:family="paragraph" style:parent-style-name="Text_20_body" style:list-style-name="L23">
      <style:paragraph-properties fo:margin-top="0cm" fo:margin-bottom="0cm" style:contextual-spacing="false"/>
      <style:text-properties officeooo:rsid="0013153a"/>
    </style:style>
    <style:style style:name="P61" style:family="paragraph" style:parent-style-name="Text_20_body" style:list-style-name="L23">
      <style:text-properties officeooo:rsid="0013153a"/>
    </style:style>
    <style:style style:name="P62" style:family="paragraph" style:parent-style-name="Text_20_body" style:list-style-name="L24">
      <style:paragraph-properties fo:margin-top="0cm" fo:margin-bottom="0cm" style:contextual-spacing="false"/>
      <style:text-properties officeooo:rsid="0013153a"/>
    </style:style>
    <style:style style:name="P63" style:family="paragraph" style:parent-style-name="Text_20_body" style:list-style-name="L24">
      <style:text-properties officeooo:rsid="0013153a"/>
    </style:style>
    <style:style style:name="P64" style:family="paragraph" style:parent-style-name="Text_20_body" style:list-style-name="L25">
      <style:paragraph-properties fo:margin-top="0cm" fo:margin-bottom="0cm" style:contextual-spacing="false"/>
      <style:text-properties officeooo:rsid="0013153a"/>
    </style:style>
    <style:style style:name="P65" style:family="paragraph" style:parent-style-name="Text_20_body" style:list-style-name="L25">
      <style:text-properties officeooo:rsid="0013153a"/>
    </style:style>
    <style:style style:name="T1" style:family="text">
      <style:text-properties officeooo:rsid="00141295"/>
    </style:style>
    <style:style style:name="T2" style:family="text">
      <style:text-properties officeooo:rsid="0018a7d2"/>
    </style:style>
    <style:style style:name="T3" style:family="text">
      <style:text-properties officeooo:rsid="0013153a"/>
    </style:style>
    <style:style style:name="T4" style:family="text">
      <style:text-properties fo:font-size="12pt" style:font-size-asian="12pt" style:font-size-complex="12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IÓN:</text:p>
      <text:p text:style-name="P1">Desarrollar un framework de People Analytics que permita evaluar el bienestar laboral mediante una encuesta estructurada, calcular indicadores de burnout, boreout y bienestar, y generar automáticamente un diagnóstico organizacional que facilite la toma de decisiones en Recursos Humanos.</text:p>
      <text:p text:style-name="P1"/>
      <text:p text:style-name="P1">ALCANCE:</text:p>
      <text:p text:style-name="P1"/>
      <text:p text:style-name="P1">Entradas:<text:line-break/>Encuesta de 48 preguntas basada en literatura científica.<text:line-break/>Datos demográficos y laborales del empleado.</text:p>
      <text:p text:style-name="P1"/>
      <text:p text:style-name="P1">Procesamiento:<text:line-break/>Cálculo automático de KPI.<text:line-break/>Agregación por trabajador.<text:line-break/>Agregación por empresa.<text:line-break/>Comparación con escenarios de referencia.<text:line-break/>Segmentación por colectivos.<text:line-break/>Generación de visualizaciones.</text:p>
      <text:p text:style-name="P1"/>
      <text:p text:style-name="P1">Salidas:<text:line-break/>Dataset estructurado.<text:line-break/>Indicadores.<text:line-break/>Dashboard.<text:line-break/>Informe automático.<text:line-break/>Recomendaciones.</text:p>
      <text:p text:style-name="P1"/>
      <text:p text:style-name="P2"><text:span text:style-name="T1">E</text:span>scenarios:</text:p>
      <text:p text:style-name="P2"/>
      <text:p text:style-name="P2"><text:span text:style-name="T2">5 </text:span>escenarios organizacionales.<text:line-break/><text:line-break/>1. Empresa Saludable (High Performance)</text:p>
      <text:p text:style-name="P2">Bajo burnout</text:p>
      <text:p text:style-name="P2">Bajo boreout</text:p>
      <text:p text:style-name="P2">Alto bienestar</text:p>
      <text:p text:style-name="P2">Baja intención de rotación</text:p>
      <text:p text:style-name="P2">Cultura organizativa equilibrada</text:p>
      <text:p text:style-name="P2">👉 Organización óptima, alta retención de talento.</text:p>
      <text:p text:style-name="P2"/>
      <text:p text:style-name="P2">🟡 2. Empresa Estable</text:p>
      <text:p text:style-name="P2">Burnout moderado</text:p>
      <text:p text:style-name="P2">Boreout bajo-moderado</text:p>
      <text:p text:style-name="P2">Bienestar medio</text:p>
      <text:p text:style-name="P2">Rotación controlada</text:p>
      <text:p text:style-name="P2">👉 Empresa funcional pero con margen de mejora.</text:p>
      <text:p text:style-name="P2"/>
      <text:p text:style-name="P2">🟠 3. Empresa en Riesgo por Burnout</text:p>
      <text:p text:style-name="P2">Alto burnout</text:p>
      <text:p text:style-name="P2">Boreout bajo o moderado</text:p>
      <text:p text:style-name="P2">Bajo bienestar</text:p>
      <text:p text:style-name="P2">Alta rotación</text:p>
      <text:p text:style-name="P2">👉 Problema principal: sobrecarga laboral.</text:p>
      <text:p text:style-name="P2"><text:soft-page-break/></text:p>
      <text:p text:style-name="P2">🔵 4. Empresa en Riesgo por Boreout</text:p>
      <text:p text:style-name="P2">Burnout bajo</text:p>
      <text:p text:style-name="P2">Alto boreout</text:p>
      <text:p text:style-name="P2">Bajo bienestar</text:p>
      <text:p text:style-name="P2">Desmotivación y desconexión</text:p>
      <text:p text:style-name="P2">👉 Problema principal: infraestimulación laboral.</text:p>
      <text:p text:style-name="P2"/>
      <text:p text:style-name="P2">🔴 5. Empresa Crítica (Dual Risk)</text:p>
      <text:p text:style-name="P2">Alto burnout</text:p>
      <text:p text:style-name="P2">Alto boreout</text:p>
      <text:p text:style-name="P2">Muy bajo bienestar</text:p>
      <text:p text:style-name="P2">Rotación extremadamente alta</text:p>
      <text:p text:style-name="P2">👉 Escenario extremo de desalineación organizativa.</text:p>
      <text:p text:style-name="P1"/>
      <text:p text:style-name="P1"/>
      <text:p text:style-name="P1"/>
      <text:p text:style-name="P1"/>
      <text:p text:style-name="P1">OBJETIVOS:</text:p>
      <text:p text:style-name="P1"/>
      <text:p text:style-name="P3"><text:span text:style-name="T3">1. </text:span>Diseñar un instrumento de medición del bienestar laboral fundamentado en literatura científica. </text:p>
      <text:p text:style-name="P3"><text:span text:style-name="T3">2. </text:span>Desarrollar un sistema capaz de transformar las respuestas de la encuesta en indicadores cuantitativos de People Analytics. </text:p>
      <text:p text:style-name="P3"><text:span text:style-name="T3">3. </text:span>Implementar un generador de escenarios sintéticos que permita validar el funcionamiento del sistema en ausencia de datos reales. </text:p>
      <text:p text:style-name="P3"><text:span text:style-name="T3">4. </text:span>Diseñar un flujo automático de análisis y visualización que facilite la interpretación de los resultados. </text:p>
      <text:p text:style-name="P3"><text:span text:style-name="T3">5. </text:span>Documentar y publicar la herramienta para facilitar su reutilización y futuras investigaciones. </text:p>
      <text:p text:style-name="P1"/>
      <text:p text:style-name="P1">PLANIFICACIÓN:</text:p>
      <text:p text:style-name="P1"/>
      <text:h text:style-name="P4" text:outline-level="2">Fase 1</text:h>
      <text:p text:style-name="P5">Diseño del instrumento</text:p>
      <text:list text:style-name="L1">
        <text:list-item>
          <text:p text:style-name="P6">revisión bibliográfica </text:p>
        </text:list-item>
        <text:list-item>
          <text:p text:style-name="P6">selección de escalas </text:p>
        </text:list-item>
        <text:list-item>
          <text:p text:style-name="P6">adaptación de preguntas </text:p>
        </text:list-item>
        <text:list-item>
          <text:p text:style-name="P6">definición de dimensiones </text:p>
        </text:list-item>
        <text:list-item>
          <text:p text:style-name="P7">definición de variables </text:p>
        </text:list-item>
      </text:list>
      <text:p text:style-name="P5">Entregable: Documento metodológico.</text:p>
      <text:h text:style-name="P8" text:outline-level="2">Fase 2</text:h>
      <text:p text:style-name="P5">Modelo analítico</text:p>
      <text:p text:style-name="P5">Aquí defines:</text:p>
      <text:list text:style-name="L2">
        <text:list-item>
          <text:p text:style-name="P9">KPI </text:p>
        </text:list-item>
        <text:list-item>
          <text:p text:style-name="P9">fórmulas </text:p>
        </text:list-item>
        <text:list-item>
          <text:p text:style-name="P9">umbrales </text:p>
        </text:list-item>
        <text:list-item>
          <text:p text:style-name="P10">estados </text:p>
        </text:list-item>
      </text:list>
      <text:p text:style-name="P5"><text:soft-page-break/>Entregable: Documento técnico.</text:p>
      <text:h text:style-name="P11" text:outline-level="2"><text:span text:style-name="T4">Fase 3</text:span></text:h>
      <text:p text:style-name="P5">Generación de escenarios</text:p>
      <text:p text:style-name="P5">Tareas</text:p>
      <text:list text:style-name="L3">
        <text:list-item>
          <text:p text:style-name="P12">definir empresa saludable </text:p>
        </text:list-item>
        <text:list-item>
          <text:p text:style-name="P12">definir empresa estable </text:p>
        </text:list-item>
        <text:list-item>
          <text:p text:style-name="P13">definir empresa en riesgo </text:p>
        </text:list-item>
      </text:list>
      <text:p text:style-name="P5">Implementar funciones.</text:p>
      <text:p text:style-name="P5">Validar resultados.</text:p>
      <text:p text:style-name="P5">Exportar datasets.</text:p>
      <text:p text:style-name="P1"/>
      <text:h text:style-name="P14" text:outline-level="2">Fase 4</text:h>
      <text:p text:style-name="P5">Pipeline de análisis</text:p>
      <text:p text:style-name="P5">Implementar notebooks.</text:p>
      <text:p text:style-name="P5">Generar</text:p>
      <text:list text:style-name="L4">
        <text:list-item>
          <text:p text:style-name="P15">descriptivos </text:p>
        </text:list-item>
        <text:list-item>
          <text:p text:style-name="P15">correlaciones </text:p>
        </text:list-item>
        <text:list-item>
          <text:p text:style-name="P15">comparaciones </text:p>
        </text:list-item>
        <text:list-item>
          <text:p text:style-name="P15">clustering </text:p>
        </text:list-item>
        <text:list-item>
          <text:p text:style-name="P16">perfiles</text:p>
        </text:list-item>
      </text:list>
      <text:h text:style-name="P14" text:outline-level="2">Fase 5</text:h>
      <text:p text:style-name="P5">Visualización</text:p>
      <text:p text:style-name="P5">Dashboard.</text:p>
      <text:p text:style-name="P5">Gráficos.</text:p>
      <text:p text:style-name="P5">Informe automático.</text:p>
      <text:p text:style-name="P5">Interpretaciones.</text:p>
      <text:h text:style-name="P14" text:outline-level="2">Fase 6</text:h>
      <text:p text:style-name="P5">Publicación</text:p>
      <text:p text:style-name="P5">GitHub</text:p>
      <text:p text:style-name="P5">Documentación</text:p>
      <text:p text:style-name="P5">Presentación</text:p>
      <text:p text:style-name="P5">Memoria</text:p>
      <text:h text:style-name="P11" text:outline-level="2"><text:soft-page-break/></text:h>
      <text:h text:style-name="P17" text:outline-level="2">Flujo de utilización de la herramienta</text:h>
      <text:p text:style-name="P5">Empresa</text:p>
      <text:p text:style-name="P5">↓</text:p>
      <text:p text:style-name="P5">Distribuye encuesta</text:p>
      <text:p text:style-name="P5">↓</text:p>
      <text:p text:style-name="P5">Trabajadores responden</text:p>
      <text:p text:style-name="P5">↓</text:p>
      <text:p text:style-name="P5">CSV</text:p>
      <text:p text:style-name="P5">↓</text:p>
      <text:p text:style-name="P5">Motor analítico</text:p>
      <text:p text:style-name="P5">↓</text:p>
      <text:p text:style-name="P5">KPI</text:p>
      <text:p text:style-name="P5">↓</text:p>
      <text:p text:style-name="P5">Dashboard</text:p>
      <text:p text:style-name="P5">↓</text:p>
      <text:p text:style-name="P5">Informe</text:p>
      <text:p text:style-name="P5">↓</text:p>
      <text:p text:style-name="P5">Recomendaciones RRHH</text:p>
      <text:p text:style-name="P5"/>
      <text:p text:style-name="P5">People Analytics: <text:span text:style-name="Strong_20_Emphasis">benchmarking</text:span>.</text:p>
      <text:p text:style-name="P5"><text:span text:style-name="T1">E</text:span>l sistema generaría tres <text:span text:style-name="Strong_20_Emphasis">benchmarks</text:span>:</text:p>
      <text:list text:style-name="L5">
        <text:list-item>
          <text:p text:style-name="P18">🟢 Organización saludable (referencia de buenas prácticas). </text:p>
        </text:list-item>
        <text:list-item>
          <text:p text:style-name="P18">🟡 Organización en equilibrio (situación intermedia). </text:p>
        </text:list-item>
        <text:list-item>
          <text:p text:style-name="P19">🔴 Organización en riesgo psicosocial. </text:p>
        </text:list-item>
      </text:list>
      <text:p text:style-name="P5">Entonces, cuando una empresa real utilice la herramienta, no solo verá sus indicadores, sino también su posición respecto a esos escenarios de referencia. Ese enfoque es mucho más potente desde el punto de vista analítico y da sentido al uso de datos sintéticos: <text:span text:style-name="Strong_20_Emphasis">no sustituyen datos reales, sino que crean un marco de comparación</text:span>.</text:p>
      <text:p text:style-name="P5"/>
      <text:p text:style-name="P5">generame un documento en markdown con toda esta definición, que me sirva para entrergar a la universidad y también para publicarlo en el readme del repositorio</text:p>
      <text:p text:style-name="P5"/>
      <text:p text:style-name="P5"/>
      <text:h text:style-name="P20" text:outline-level="1"><text:soft-page-break/>📊 People Analytics Framework</text:h>
      <text:h text:style-name="P21" text:outline-level="2">Evaluación del bienestar laboral mediante burnout, boreout y rotación</text:h>
      <text:p text:style-name="P22"/>
      <text:h text:style-name="P21" text:outline-level="2">🧭 1. Misión del proyecto</text:h>
      <text:p text:style-name="P5">El objetivo de este proyecto es desarrollar un <text:span text:style-name="Strong_20_Emphasis">framework de People Analytics</text:span> capaz de:</text:p>
      <text:list text:style-name="L6">
        <text:list-item>
          <text:p text:style-name="P23">Medir el bienestar laboral de los empleados mediante una encuesta estructurada. </text:p>
        </text:list-item>
        <text:list-item>
          <text:p text:style-name="P23">Calcular indicadores cuantitativos de: </text:p>
          <text:list>
            <text:list-item>
              <text:p text:style-name="P23">Burnout </text:p>
            </text:list-item>
            <text:list-item>
              <text:p text:style-name="P23">Boreout </text:p>
            </text:list-item>
            <text:list-item>
              <text:p text:style-name="P23">Bienestar </text:p>
            </text:list-item>
            <text:list-item>
              <text:p text:style-name="P23">Intención de rotación </text:p>
            </text:list-item>
          </text:list>
        </text:list-item>
        <text:list-item>
          <text:p text:style-name="P23">Generar automáticamente un <text:span text:style-name="Strong_20_Emphasis">diagnóstico organizacional interpretable</text:span>. </text:p>
        </text:list-item>
        <text:list-item>
          <text:p text:style-name="P24">Facilitar la toma de decisiones en Recursos Humanos mediante analítica avanzada. </text:p>
        </text:list-item>
      </text:list>
      <text:p text:style-name="P5">Este framework no se limita al análisis de datos, sino que se concibe como una <text:span text:style-name="Strong_20_Emphasis">herramienta reutilizable de evaluación organizacional</text:span>.</text:p>
      <text:p text:style-name="P22"/>
      <text:h text:style-name="P21" text:outline-level="2">🎯 2. Alcance del sistema</text:h>
      <text:p text:style-name="P5">El sistema desarrollado incluye:</text:p>
      <text:h text:style-name="P25" text:outline-level="3">📋 Instrumento de medición</text:h>
      <text:list text:style-name="L7">
        <text:list-item>
          <text:p text:style-name="P26">Encuesta de 48 preguntas basada en literatura científica en: </text:p>
          <text:list>
            <text:list-item>
              <text:p text:style-name="P26">Burnout (Maslach et al.) </text:p>
            </text:list-item>
            <text:list-item>
              <text:p text:style-name="P26">Boreout (concepto de infraestimulación laboral) </text:p>
            </text:list-item>
            <text:list-item>
              <text:p text:style-name="P26">Bienestar laboral </text:p>
            </text:list-item>
            <text:list-item>
              <text:p text:style-name="P27">Intención de rotación </text:p>
            </text:list-item>
          </text:list>
        </text:list-item>
      </text:list>
      <text:p text:style-name="P22"/>
      <text:h text:style-name="P25" text:outline-level="3">📊 Procesamiento de datos</text:h>
      <text:list text:style-name="L8">
        <text:list-item>
          <text:p text:style-name="P28">Cálculo de KPIs: </text:p>
          <text:list>
            <text:list-item>
              <text:p text:style-name="P28">Burnout global </text:p>
            </text:list-item>
            <text:list-item>
              <text:p text:style-name="P28">Boreout global </text:p>
            </text:list-item>
            <text:list-item>
              <text:p text:style-name="P28">Bienestar global </text:p>
            </text:list-item>
            <text:list-item>
              <text:p text:style-name="P28">Rotación global </text:p>
            </text:list-item>
          </text:list>
        </text:list-item>
        <text:list-item>
          <text:p text:style-name="P28">Agregación por empleado y empresa </text:p>
        </text:list-item>
        <text:list-item>
          <text:p text:style-name="P28">Análisis descriptivo y comparativo </text:p>
        </text:list-item>
        <text:list-item>
          <text:p text:style-name="P29">Segmentación de empleados </text:p>
        </text:list-item>
      </text:list>
      <text:p text:style-name="P22"><text:soft-page-break/></text:p>
      <text:h text:style-name="P25" text:outline-level="3">🧠 Sistema de interpretación</text:h>
      <text:p text:style-name="P5">El sistema permite transformar los indicadores en <text:span text:style-name="Strong_20_Emphasis">perfiles organizacionales</text:span>, facilitando la interpretación:</text:p>
      <text:list text:style-name="L9">
        <text:list-item>
          <text:p text:style-name="P30">Tipo de organización </text:p>
        </text:list-item>
        <text:list-item>
          <text:p text:style-name="P30">Nivel de riesgo psicosocial </text:p>
        </text:list-item>
        <text:list-item>
          <text:p text:style-name="P31">Diagnóstico de clima laboral </text:p>
        </text:list-item>
      </text:list>
      <text:p text:style-name="P22"/>
      <text:h text:style-name="P25" text:outline-level="3">📈 Visualización</text:h>
      <text:list text:style-name="L10">
        <text:list-item>
          <text:p text:style-name="P32">Gráficos comparativos </text:p>
        </text:list-item>
        <text:list-item>
          <text:p text:style-name="P32">Análisis por categorías: </text:p>
          <text:list>
            <text:list-item>
              <text:p text:style-name="P32">Cultura organizacional </text:p>
            </text:list-item>
            <text:list-item>
              <text:p text:style-name="P32">Modalidad de trabajo </text:p>
            </text:list-item>
            <text:list-item>
              <text:p text:style-name="P32">Departamento </text:p>
            </text:list-item>
            <text:list-item>
              <text:p text:style-name="P32">Seniority </text:p>
            </text:list-item>
          </text:list>
        </text:list-item>
        <text:list-item>
          <text:p text:style-name="P33">Interpretación automática de resultados </text:p>
        </text:list-item>
      </text:list>
      <text:p text:style-name="P22"/>
      <text:h text:style-name="P21" text:outline-level="2">🏢 3. Benchmark organizacional (núcleo del sistema)</text:h>
      <text:p text:style-name="P5">En lugar de trabajar con “datasets aleatorios”, el sistema se basa en <text:span text:style-name="Strong_20_Emphasis">perfiles organizacionales de referencia</text:span> (benchmarks).</text:p>
      <text:p text:style-name="P5">Estos perfiles permiten simular y comparar distintos tipos de organizaciones.</text:p>
      <text:p text:style-name="P22"/>
      <text:h text:style-name="P25" text:outline-level="3">🟢 3.1 Organización saludable</text:h>
      <text:p text:style-name="P5">Características:</text:p>
      <text:list text:style-name="L11">
        <text:list-item>
          <text:p text:style-name="P34">Burnout bajo </text:p>
        </text:list-item>
        <text:list-item>
          <text:p text:style-name="P34">Boreout bajo </text:p>
        </text:list-item>
        <text:list-item>
          <text:p text:style-name="P34">Bienestar alto </text:p>
        </text:list-item>
        <text:list-item>
          <text:p text:style-name="P35">Rotación baja </text:p>
        </text:list-item>
      </text:list>
      <text:p text:style-name="P5">Interpretación:</text:p>
      <text:p text:style-name="P5">Organización equilibrada, con carga de trabajo adecuada, motivación alta y buen clima laboral.</text:p>
      <text:p text:style-name="P22"/>
      <text:h text:style-name="P25" text:outline-level="3">🟠 3.2 Organización con riesgo de burnout</text:h>
      <text:p text:style-name="P5">Características:</text:p>
      <text:list text:style-name="L12">
        <text:list-item>
          <text:p text:style-name="P36">Burnout alto </text:p>
        </text:list-item>
        <text:list-item>
          <text:p text:style-name="P36">Boreout bajo </text:p>
        </text:list-item>
        <text:list-item>
          <text:p text:style-name="P36"><text:soft-page-break/>Bienestar bajo </text:p>
        </text:list-item>
        <text:list-item>
          <text:p text:style-name="P37">Rotación alta </text:p>
        </text:list-item>
      </text:list>
      <text:p text:style-name="P5">Interpretación:</text:p>
      <text:p text:style-name="P5">Sobrecarga laboral, estrés elevado, presión sostenida y riesgo de abandono.</text:p>
      <text:p text:style-name="P22"/>
      <text:h text:style-name="P25" text:outline-level="3">🟡 3.3 Organización con riesgo de boreout</text:h>
      <text:p text:style-name="P5">Características:</text:p>
      <text:list text:style-name="L13">
        <text:list-item>
          <text:p text:style-name="P38">Burnout bajo </text:p>
        </text:list-item>
        <text:list-item>
          <text:p text:style-name="P38">Boreout alto </text:p>
        </text:list-item>
        <text:list-item>
          <text:p text:style-name="P38">Bienestar medio-bajo </text:p>
        </text:list-item>
        <text:list-item>
          <text:p text:style-name="P39">Rotación media-alta </text:p>
        </text:list-item>
      </text:list>
      <text:p text:style-name="P5">Interpretación:</text:p>
      <text:p text:style-name="P5">Infrautilización del talento, falta de retos y desmotivación.</text:p>
      <text:p text:style-name="P22"/>
      <text:h text:style-name="P25" text:outline-level="3">🔴 3.4 Organización crítica (mixta)</text:h>
      <text:p text:style-name="P5">Características:</text:p>
      <text:list text:style-name="L14">
        <text:list-item>
          <text:p text:style-name="P40">Burnout alto </text:p>
        </text:list-item>
        <text:list-item>
          <text:p text:style-name="P40">Boreout alto </text:p>
        </text:list-item>
        <text:list-item>
          <text:p text:style-name="P40">Bienestar muy bajo </text:p>
        </text:list-item>
        <text:list-item>
          <text:p text:style-name="P41">Rotación muy alta </text:p>
        </text:list-item>
      </text:list>
      <text:p text:style-name="P5">Interpretación:</text:p>
      <text:p text:style-name="P5">Desigualdad interna: coexistencia de sobrecarga y subutilización en distintos equipos o áreas.</text:p>
      <text:p text:style-name="P22"/>
      <text:h text:style-name="P25" text:outline-level="3">⚪ 3.5 Organización estable</text:h>
      <text:p text:style-name="P5">Características:</text:p>
      <text:list text:style-name="L15">
        <text:list-item>
          <text:p text:style-name="P42">Burnout medio </text:p>
        </text:list-item>
        <text:list-item>
          <text:p text:style-name="P42">Boreout medio </text:p>
        </text:list-item>
        <text:list-item>
          <text:p text:style-name="P42">Bienestar medio </text:p>
        </text:list-item>
        <text:list-item>
          <text:p text:style-name="P43">Rotación media </text:p>
        </text:list-item>
      </text:list>
      <text:p text:style-name="P5">Interpretación:</text:p>
      <text:p text:style-name="P5">Situación equilibrada sin problemas críticos, pero sin ventajas competitivas en bienestar.</text:p>
      <text:p text:style-name="P22"/>
      <text:h text:style-name="P21" text:outline-level="2"><text:soft-page-break/>⚙️ 4. Funcionamiento del generador</text:h>
      <text:p text:style-name="P5">El sistema utiliza un <text:span text:style-name="Strong_20_Emphasis">parámetro de perfil organizacional</text:span> que modifica las variables latentes del modelo.</text:p>
      <text:h text:style-name="P25" text:outline-level="3">🔧 Ejemplo conceptual</text:h>
      <text:section text:style-name="Sect1" text:name="code-block-viewer">
        <text:p text:style-name="P44"><text:span text:style-name="Source_20_Text">perfil = "burnout_risk"</text:span></text:p>
      </text:section>
      <text:p text:style-name="P22"/>
      <text:h text:style-name="P25" text:outline-level="3">🧬 Variables latentes ajustadas</text:h>
      <text:p text:style-name="P5">El generador modifica:</text:p>
      <text:list text:style-name="L16">
        <text:list-item>
          <text:p text:style-name="P45">Burnout latente </text:p>
        </text:list-item>
        <text:list-item>
          <text:p text:style-name="P45">Boreout latente </text:p>
        </text:list-item>
        <text:list-item>
          <text:p text:style-name="P45">Bienestar latente </text:p>
        </text:list-item>
        <text:list-item>
          <text:p text:style-name="P46">Rotación latente </text:p>
        </text:list-item>
      </text:list>
      <text:p text:style-name="P5">Según el perfil seleccionado.</text:p>
      <text:p text:style-name="P22"/>
      <text:h text:style-name="P25" text:outline-level="3">🔄 Pipeline de generación</text:h>
      <text:list text:style-name="L17">
        <text:list-item>
          <text:p text:style-name="P47">Selección del perfil organizacional </text:p>
        </text:list-item>
        <text:list-item>
          <text:p text:style-name="P47">Ajuste de distribuciones latentes </text:p>
        </text:list-item>
        <text:list-item>
          <text:p text:style-name="P47">Generación de empleados </text:p>
        </text:list-item>
        <text:list-item>
          <text:p text:style-name="P47">Simulación de respuestas a encuesta </text:p>
        </text:list-item>
        <text:list-item>
          <text:p text:style-name="P47">Cálculo de KPIs </text:p>
        </text:list-item>
        <text:list-item>
          <text:p text:style-name="P48">Exportación de datasets </text:p>
        </text:list-item>
      </text:list>
      <text:p text:style-name="P22"/>
      <text:h text:style-name="P21" text:outline-level="2">🧪 5. Validación del sistema</text:h>
      <text:p text:style-name="P5">El sistema se valida mediante:</text:p>
      <text:list text:style-name="L18">
        <text:list-item>
          <text:p text:style-name="P49">Consistencia interna de escalas </text:p>
        </text:list-item>
        <text:list-item>
          <text:p text:style-name="P49">Correlaciones esperadas: </text:p>
          <text:list>
            <text:list-item>
              <text:p text:style-name="P49">Burnout ↑ → Rotación ↑ </text:p>
            </text:list-item>
            <text:list-item>
              <text:p text:style-name="P49">Boreout ↑ → Rotación ↑ </text:p>
            </text:list-item>
            <text:list-item>
              <text:p text:style-name="P49">Bienestar ↑ → Rotación ↓ </text:p>
            </text:list-item>
          </text:list>
        </text:list-item>
        <text:list-item>
          <text:p text:style-name="P49">Coherencia entre variables organizacionales </text:p>
        </text:list-item>
        <text:list-item>
          <text:p text:style-name="P50">Reproducción de patrones teóricos de la literatura </text:p>
        </text:list-item>
      </text:list>
      <text:p text:style-name="P22"/>
      <text:h text:style-name="P21" text:outline-level="2">📦 6. Salidas del sistema</text:h>
      <text:p text:style-name="P5">El framework genera:</text:p>
      <text:h text:style-name="P25" text:outline-level="3"><text:soft-page-break/>📁 Datasets</text:h>
      <text:list text:style-name="L19">
        <text:list-item>
          <text:p text:style-name="P51">empresas.csv </text:p>
        </text:list-item>
        <text:list-item>
          <text:p text:style-name="P51">empleados.csv </text:p>
        </text:list-item>
        <text:list-item>
          <text:p text:style-name="P51">encuestas.csv </text:p>
        </text:list-item>
        <text:list-item>
          <text:p text:style-name="P52">scores.csv </text:p>
        </text:list-item>
      </text:list>
      <text:p text:style-name="P22"/>
      <text:h text:style-name="P25" text:outline-level="3">📊 Indicadores</text:h>
      <text:list text:style-name="L20">
        <text:list-item>
          <text:p text:style-name="P53">KPIs por empleado </text:p>
        </text:list-item>
        <text:list-item>
          <text:p text:style-name="P53">KPIs por empresa </text:p>
        </text:list-item>
        <text:list-item>
          <text:p text:style-name="P54">Distribuciones por segmento </text:p>
        </text:list-item>
      </text:list>
      <text:p text:style-name="P22"/>
      <text:h text:style-name="P25" text:outline-level="3">📈 Visualizaciones</text:h>
      <text:list text:style-name="L21">
        <text:list-item>
          <text:p text:style-name="P55">Comparación entre perfiles organizacionales </text:p>
        </text:list-item>
        <text:list-item>
          <text:p text:style-name="P55">Análisis por departamento </text:p>
        </text:list-item>
        <text:list-item>
          <text:p text:style-name="P55">Impacto de cultura organizacional </text:p>
        </text:list-item>
        <text:list-item>
          <text:p text:style-name="P56">Relación entre variables psicosociales </text:p>
        </text:list-item>
      </text:list>
      <text:p text:style-name="P22"/>
      <text:h text:style-name="P25" text:outline-level="3">📄 Informe automático</text:h>
      <text:p text:style-name="P5">El sistema permite generar:</text:p>
      <text:list text:style-name="L22">
        <text:list-item>
          <text:p text:style-name="P57">Diagnóstico organizacional </text:p>
        </text:list-item>
        <text:list-item>
          <text:p text:style-name="P57">Identificación de riesgos </text:p>
        </text:list-item>
        <text:list-item>
          <text:p text:style-name="P58">Recomendaciones para RRHH </text:p>
        </text:list-item>
      </text:list>
      <text:p text:style-name="P22"/>
      <text:h text:style-name="P21" text:outline-level="2">🚀 7. Valor del proyecto</text:h>
      <text:p text:style-name="P5">Este proyecto no se limita a un análisis descriptivo de datos, sino que propone un:</text:p>
      <text:p text:style-name="P59"><text:span text:style-name="Strong_20_Emphasis">Framework de People Analytics replicable y extensible</text:span></text:p>
      <text:p text:style-name="P5">Sus principales aportes son:</text:p>
      <text:list text:style-name="L23">
        <text:list-item>
          <text:p text:style-name="P60">Estandarización de la medición del bienestar laboral </text:p>
        </text:list-item>
        <text:list-item>
          <text:p text:style-name="P60">Integración de teoría psicológica organizacional con analítica de datos </text:p>
        </text:list-item>
        <text:list-item>
          <text:p text:style-name="P60">Generación de escenarios comparables (benchmarks) </text:p>
        </text:list-item>
        <text:list-item>
          <text:p text:style-name="P60">Interpretación automatizada de resultados </text:p>
        </text:list-item>
        <text:list-item>
          <text:p text:style-name="P61">Base para futuros modelos predictivos con datos reales </text:p>
        </text:list-item>
      </text:list>
      <text:p text:style-name="P22"/>
      <text:h text:style-name="P21" text:outline-level="2"><text:soft-page-break/>🔮 8. Evolución futura</text:h>
      <text:p text:style-name="P5">Con datos reales acumulados en organizaciones, el framework podrá evolucionar hacia:</text:p>
      <text:list text:style-name="L24">
        <text:list-item>
          <text:p text:style-name="P62">Modelos predictivos de rotación </text:p>
        </text:list-item>
        <text:list-item>
          <text:p text:style-name="P62">Predicción de burnout </text:p>
        </text:list-item>
        <text:list-item>
          <text:p text:style-name="P62">Sistemas de alerta temprana </text:p>
        </text:list-item>
        <text:list-item>
          <text:p text:style-name="P63">Dashboards en tiempo real </text:p>
        </text:list-item>
      </text:list>
      <text:p text:style-name="P22"/>
      <text:h text:style-name="P21" text:outline-level="2">🧾 9. Conclusión</text:h>
      <text:p text:style-name="P5">Este framework representa una aproximación estructurada a la analítica de personas, combinando:</text:p>
      <text:list text:style-name="L25">
        <text:list-item>
          <text:p text:style-name="P64">Psicología organizacional </text:p>
        </text:list-item>
        <text:list-item>
          <text:p text:style-name="P64">Estadística aplicada </text:p>
        </text:list-item>
        <text:list-item>
          <text:p text:style-name="P64">Simulación de datos </text:p>
        </text:list-item>
        <text:list-item>
          <text:p text:style-name="P65">Visualización y storytelling de datos </text:p>
        </text:list-item>
      </text:list>
      <text:p text:style-name="P5">Su objetivo final es convertirse en una herramienta práctica para mejorar la toma de decisiones en Recursos Humanos basada en evidencia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11:02:18.940111100</meta:creation-date>
    <dc:date>2026-07-05T13:52:26.617060600</dc:date>
    <meta:editing-duration>PT2H17M57S</meta:editing-duration>
    <meta:editing-cycles>3</meta:editing-cycles>
    <meta:generator>LibreOffice/26.2.4.2$Windows_X86_64 LibreOffice_project/0229ac93fcf0d7cbc6376066c6f35021cef002dc</meta:generator>
    <meta:document-statistic meta:table-count="0" meta:image-count="0" meta:object-count="0" meta:page-count="11" meta:paragraph-count="272" meta:word-count="1290" meta:character-count="8830" meta:non-whitespace-character-count="7807"/>
  </office:meta>
</office:document-meta>
</file>