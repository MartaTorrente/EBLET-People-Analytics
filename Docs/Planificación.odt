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153a" officeooo:paragraph-rsid="001315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IÓN:</text:p>
      <text:p text:style-name="P1">Marco de trabajo, framework, de referencia que contenga las herramientas necesarias para mejorar el bienestar laboral y proporcionar una herramienta para medir/controlar/evitar la rotación.</text:p>
      <text:p text:style-name="P1"/>
      <text:p text:style-name="P1">ALCANCE:</text:p>
      <text:p text:style-name="P1"/>
      <text:p text:style-name="P1">- 1 encuesta de 48 preguntas</text:p>
      <text:p text:style-name="P1">- 3 csv con resultados 1 por empresa</text:p>
      <text:p text:style-name="P1">- 5 KPI’s indicadores de boreout/burnout/bienestar/rotación</text:p>
      <text:p text:style-name="P1">- 3 empresas que representes los 3 escenarios de 2500 trabajadores (por escenario)</text:p>
      <text:p text:style-name="P1">- 3 csv, 1 csv por escenario</text:p>
      <text:p text:style-name="P1">- 3 jupyter notebook identicos con resultados (cambia en función de los datos)</text:p>
      <text:p text:style-name="P1">- 6 gráficos comparativos + explicación/interpretación</text:p>
      <text:p text:style-name="P1">- Informe /memoria</text:p>
      <text:p text:style-name="P1">- presentación power point para la defensa</text:p>
      <text:p text:style-name="P1"/>
      <text:p text:style-name="P1">OBJETIVOS:</text:p>
      <text:p text:style-name="P1"/>
      <text:p text:style-name="P1">1. Crear herramienta que permita recabar información de trabajadores y almacenarla de manera estructurada (encuesta)</text:p>
      <text:p text:style-name="P1">2. Desarrollar cálculos/algorítmos/equaciones que permitan sacar indicadores para sintetizar/entender y generar estados trabajador / empresas a partir de los datos</text:p>
      <text:p text:style-name="P1">3. Generar datos para crear 3 escenarios de datos comparativos como puntos de referencia para poder ubicar de manera directa los resultados dentro de un espectro</text:p>
      <text:p text:style-name="P1">4. Desarrollar elementos visuales (gráfico/ informe/ dashboard) que permitan la visualización del objetivo 3 de forma sencilla.</text:p>
      <text:p text:style-name="P1">5. Publicar herramientas y conclusiones (web /codigo..) para hacerlas accesibles con el objetivo de continuar con el desarrollo / investigación.</text:p>
      <text:p text:style-name="P1"/>
      <text:p text:style-name="P1">PLANIFICACIÓN:</text:p>
      <text:p text:style-name="P1"/>
      <text:p text:style-name="P1">1. Objetivo 1:</text:p>
      <text:p text:style-name="P1">- Crear encuestas</text:p>
      <text:p text:style-name="P1"><text:tab/>- Documentación cientifica/papers</text:p>
      <text:p text:style-name="P1"><text:tab/>- Definir encuesta</text:p>
      <text:p text:style-name="P1"><text:tab/>- exportar y guardar datos (generar csv</text:p>
      <text:p text:style-name="P1">- Entregable: documento markdown/word con toda la información</text:p>
      <text:p text:style-name="P1"/>
      <text:p text:style-name="P1">2. Objetivo 2:</text:p>
      <text:p text:style-name="P1">- Defirnir escenarios /caracteríticas empresas y trabajadores</text:p>
      <text:p text:style-name="P1">- Identificar KPI’s</text:p>
      <text:p text:style-name="P1">- Definir KPI’s (como se calculan)</text:p>
      <text:p text:style-name="P1">- Definir umbrales respuestas para datos sintéticos</text:p>
      <text:p text:style-name="P1">- Entregable: Markdown con las explicaciones</text:p>
      <text:p text:style-name="P1"/>
      <text:p text:style-name="P1">3. Objetivo 3:</text:p>
      <text:p text:style-name="P1">- Implementar las funciones que generan los datos sintéticos para trabajadores / empresas / encuestas</text:p>
      <text:p text:style-name="P1">- Ajustar parámetros funciones para generar los distintos escenarios</text:p>
      <text:p text:style-name="P1">- validar /redefinir tareas obj 2 en base a los resultados observaos</text:p>
      <text:p text:style-name="P1">- Entregable: 1 jupyter notebook que contiene la generación de los 3 escenarios + validación , dataframe/csv (empresas, empleados, 3 resultados encuestas</text:p>
      <text:p text:style-name="P1"><text:soft-page-break/>4. Objetivo 4:</text:p>
      <text:p text:style-name="P1">- definir relacion variables</text:p>
      <text:p text:style-name="P1">- idoneidad de visuales</text:p>
      <text:p text:style-name="P1">- plantear justificaciones : que buscamos explicar con cada gráficos</text:p>
      <text:p text:style-name="P1">- entregable: </text:p>
      <text:p text:style-name="P1"/>
      <text:p text:style-name="P1">5. Objetivo 5:</text:p>
      <text:p text:style-name="P1">- generar repositorio Github</text:p>
      <text:p text:style-name="P1">- informe (memoria)</text:p>
      <text:p text:style-name="P1">- presentación power point defensa oral proyectos</text:p>
      <text:p text:style-name="P1"/>
      <text:p text:style-name="P1">Opcional:</text:p>
      <text:p text:style-name="P1">- publicar site con pagina web, encuesta, generación de informe personaliza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5T11:02:18.940111100</meta:creation-date>
    <dc:date>2026-07-05T11:23:24.612804700</dc:date>
    <meta:editing-duration>PT21M7S</meta:editing-duration>
    <meta:editing-cycles>1</meta:editing-cycles>
    <meta:document-statistic meta:table-count="0" meta:image-count="0" meta:object-count="0" meta:page-count="2" meta:paragraph-count="47" meta:word-count="367" meta:character-count="2519" meta:non-whitespace-character-count="2195"/>
    <meta:generator>LibreOffice/26.2.4.2$Windows_X86_64 LibreOffice_project/0229ac93fcf0d7cbc6376066c6f35021cef002dc</meta:generator>
  </office:meta>
</office:document-meta>
</file>